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2.859cm"/>
    </style:style>
    <style:style style:name="co11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text-underline-style="none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UMV_enhanced_meta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UPDRS_III_2024</text:p>
          </table:table-cell>
          <table:table-cell office:value-type="string" calcext:value-type="string">
            <text:p>H&amp;Y_2024</text:p>
          </table:table-cell>
          <table:table-cell office:value-type="string" calcext:value-type="string">
            <text:p>Years_educ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HC_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HUMV_HC_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5"/>
          <table:table-cell table:number-columns-repeated="14"/>
        </table:table-row>
        <table:table-row table:style-name="ro1">
          <table:table-cell table:style-name="ce1" office:value-type="string" calcext:value-type="string">
            <text:p>HUMV_HC_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UMV_HC_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UMV_HC_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 office:value-type="string" calcext:value-type="string">
            <text:p>HUMV_NFC_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HC_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HUMV_HC_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HC_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 office:value-type="string" calcext:value-type="string">
            <text:p>HUMV_HC_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HUMV_HC_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HUMV_HC_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HC_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" office:value-type="string" calcext:value-type="string">
            <text:p>HUMV_HC_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UMV_HC_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HC_1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" office:value-type="string" calcext:value-type="string">
            <text:p>HUMV_HC_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HUMV_HC_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" office:value-type="string" calcext:value-type="string">
            <text:p>HUMV_HC_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HC_1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1" office:value-type="string" calcext:value-type="string">
            <text:p>HUMV_HC_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HUMV_HC_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UMV_HC_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HUMV_NFC_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UMV_HC_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6" office:value-type="string" calcext:value-type="string">
            <text:p>HUMV_NFC_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HUMV_HC_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HUMV_HC_2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UMV_HC_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 office:value-type="string" calcext:value-type="string">
            <text:p>HUMV_HC_1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UMV_HC_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HUMV_HC_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HC_1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 office:value-type="string" calcext:value-type="string">
            <text:p>HUMV_NFC_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HC_2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HUMV_HC_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HC_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HUMV_NFC_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HC_2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2" office:value-type="string" calcext:value-type="string">
            <text:p>HUMV_HC_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HC_2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" office:value-type="string" calcext:value-type="string">
            <text:p>HUMV_HC_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HUMV_HC_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HUMV_HC_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UMV_HC_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 office:value-type="string" calcext:value-type="string">
            <text:p>HUMV_HC_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HUMV_HC_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HUMV_NFC_1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UMV_NFC_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HUMV_NFC_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NFC_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HUMV_NFC_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NFC_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HUMV_NFC_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NFC_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1" office:value-type="string" calcext:value-type="string">
            <text:p>HUMV_NFC_1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UMV_NFC_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HUMV_NFC_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NFC_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HUMV_NFC_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NFC_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HUMV_HC_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NFC_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HUMV_HC_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V_NFC_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UMV_NFC_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UMV_NFC_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NFC_1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UMV_NFC_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NFC_1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UMV_NFC_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UMV_NFC_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UMV_NFC_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UMV_NFC_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UMV_NFC_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NFC_2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UMV_NFC_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NFC_2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UMV_NFC_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UMV_NFC_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5"/>
          <table:table-cell table:number-columns-repeated="10"/>
        </table:table-row>
        <table:table-row table:style-name="ro1">
          <table:table-cell table:style-name="ce3" office:value-type="string" calcext:value-type="string">
            <text:p>HUMV_AC_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  <table:table-cell table:number-columns-repeated="4"/>
          <table:table-cell table:style-name="ce5"/>
          <table:table-cell table:number-columns-repeated="10"/>
        </table:table-row>
        <table:table-row table:style-name="ro1">
          <table:table-cell table:style-name="ce4" office:value-type="string" calcext:value-type="string">
            <text:p>HUMV_AC_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/>
          <table:table-cell table:number-columns-repeated="4"/>
          <table:table-cell table:style-name="ce5"/>
          <table:table-cell table:number-columns-repeated="10"/>
        </table:table-row>
        <table:table-row table:style-name="ro1">
          <table:table-cell table:style-name="ce3" office:value-type="string" calcext:value-type="string">
            <text:p>HUMV_AC_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HUMV_HC_9</text:p>
          </table:table-cell>
          <table:table-cell table:number-columns-repeated="4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HUMV_NFC_21</text:p>
          </table:table-cell>
          <table:table-cell/>
          <table:table-cell table:style-name="ce2" office:value-type="string" calcext:value-type="string">
            <text:p>HUMV_PD_3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HUMV_HC_17</text:p>
          </table:table-cell>
          <table:table-cell/>
          <table:table-cell table:style-name="ce2" office:value-type="string" calcext:value-type="string">
            <text:p>HUMV_PD_17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HUMV_NFC_23</text:p>
          </table:table-cell>
          <table:table-cell/>
          <table:table-cell table:style-name="ce5" office:value-type="string" calcext:value-type="string">
            <text:p>HUMV_PD_4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HUMV_NFC_22</text:p>
          </table:table-cell>
          <table:table-cell/>
          <table:table-cell table:style-name="ce5" office:value-type="string" calcext:value-type="string">
            <text:p>HUMV_PD_21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1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HUMV_NFC_12</text:p>
          </table:table-cell>
          <table:table-cell/>
          <table:table-cell office:value-type="string" calcext:value-type="string">
            <text:p>HUMV_PD_27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1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HUMV_NFC_6</text:p>
          </table:table-cell>
          <table:table-cell/>
          <table:table-cell table:style-name="ce5" office:value-type="string" calcext:value-type="string">
            <text:p>HUMV_PD_5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1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number-columns-repeated="4"/>
          <table:table-cell table:style-name="ce5"/>
          <table:table-cell table:style-name="ce13"/>
          <table:table-cell table:number-columns-repeated="2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1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1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1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HUMV_HC_22</text:p>
          </table:table-cell>
          <table:table-cell/>
          <table:table-cell table:style-name="ce5" office:value-type="string" calcext:value-type="string">
            <text:p>HUMV_PD_16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HUMV_NFC_9</text:p>
          </table:table-cell>
          <table:table-cell/>
          <table:table-cell office:value-type="string" calcext:value-type="string">
            <text:p>HUMV_PD_26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1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HUMV_NFC_23</text:p>
          </table:table-cell>
          <table:table-cell/>
          <table:table-cell office:value-type="string" calcext:value-type="string">
            <text:p>HUMV_PD_31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2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HUMV_HC_19</text:p>
          </table:table-cell>
          <table:table-cell/>
          <table:table-cell table:style-name="ce5" office:value-type="string" calcext:value-type="string">
            <text:p>HUMV_PD_18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HUMV_HC_11</text:p>
          </table:table-cell>
          <table:table-cell/>
          <table:table-cell office:value-type="string" calcext:value-type="string">
            <text:p>HUMV_PD_28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2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HUMV_HC_16</text:p>
          </table:table-cell>
          <table:table-cell/>
          <table:table-cell office:value-type="string" calcext:value-type="string">
            <text:p>HUMV_PD_23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2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HUMV_NFC_18</text:p>
          </table:table-cell>
          <table:table-cell/>
          <table:table-cell office:value-type="string" calcext:value-type="string">
            <text:p>HUMV_PD_32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HUMV_NFC_24</text:p>
          </table:table-cell>
          <table:table-cell/>
          <table:table-cell table:style-name="ce5" office:value-type="string" calcext:value-type="string">
            <text:p>HUMV_PD_20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3" office:value-type="string" calcext:value-type="string">
            <text:p>HUMV_AC_2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MV_NFC_6</text:p>
          </table:table-cell>
          <table:table-cell table:number-columns-repeated="4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2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2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2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HUMV_HC_24</text:p>
          </table:table-cell>
          <table:table-cell/>
          <table:table-cell table:style-name="ce5" office:value-type="string" calcext:value-type="string">
            <text:p>HUMV_PD_6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HUMV_AC_3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3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HUMV_HC_4</text:p>
          </table:table-cell>
          <table:table-cell/>
          <table:table-cell office:value-type="string" calcext:value-type="string">
            <text:p>HUMV_PD_29</text:p>
          </table:table-cell>
          <table:table-cell table:number-columns-repeated="2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table:style-name="ce3" office:value-type="string" calcext:value-type="string">
            <text:p>HUMV_AC_3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UMV_HC_19</text:p>
          </table:table-cell>
          <table:table-cell table:number-columns-repeated="4"/>
          <table:table-cell table:style-name="ce5"/>
          <table:table-cell table:number-columns-repeated="3"/>
          <table:table-cell table:style-name="ce5" table:number-columns-repeated="7"/>
        </table:table-row>
        <table:table-row table:style-name="ro1">
          <table:table-cell office:value-type="string" calcext:value-type="string">
            <text:p>HUMV_AC_3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UMV_NFC_8</text:p>
          </table:table-cell>
          <table:table-cell/>
          <table:table-cell table:style-name="ce5" office:value-type="string" calcext:value-type="string">
            <text:p>HUMV_PD_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UMV_PD_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HUMV_PD_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HUMV_PD_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1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1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1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HUMV_PD_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1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1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1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1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1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2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2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2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2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2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2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2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2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2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3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3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3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UMV_PD_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7T12:38:24.177022781</dc:date>
    <meta:editing-duration>PT41M8S</meta:editing-duration>
    <meta:editing-cycles>2</meta:editing-cycles>
    <meta:generator>LibreOffice/7.3.7.2$Linux_X86_64 LibreOffice_project/30$Build-2</meta:generator>
    <meta:document-statistic meta:table-count="1" meta:cell-count="897" meta:object-count="0"/>
  </office:meta>
</office:document-meta>
</file>