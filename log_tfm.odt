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2b3" officeooo:paragraph-rsid="001722b3"/>
    </style:style>
    <style:style style:name="P2" style:family="paragraph" style:parent-style-name="Standard">
      <style:text-properties officeooo:rsid="001722b3" officeooo:paragraph-rsid="0018e356"/>
    </style:style>
    <style:style style:name="P3" style:family="paragraph" style:parent-style-name="Standard">
      <style:paragraph-properties style:line-height-at-least="0.503cm"/>
      <style:text-properties fo:color="#bbbebf" loext:opacity="100%" style:font-name="Droid Sans Mono" fo:font-size="10.5pt" fo:font-weight="normal" fo:background-color="#121314"/>
    </style:style>
    <style:style style:name="P4" style:family="paragraph" style:parent-style-name="Standard">
      <style:text-properties fo:color="#bbbebf" loext:opacity="100%" style:font-name="Droid Sans Mono" fo:font-size="10.5pt" fo:font-weight="normal" officeooo:rsid="001722b3" officeooo:paragraph-rsid="001722b3" fo:background-color="#121314"/>
    </style:style>
    <style:style style:name="P5" style:family="paragraph" style:parent-style-name="Standard">
      <style:text-properties fo:font-size="18pt" fo:font-weight="bold" officeooo:rsid="001722b3" officeooo:paragraph-rsid="001722b3" style:font-size-asian="18pt" style:font-weight-asian="bold" style:font-size-complex="18pt" style:font-weight-complex="bold"/>
    </style:style>
    <style:style style:name="P6" style:family="paragraph" style:parent-style-name="Standard">
      <style:text-properties officeooo:rsid="0018e356" officeooo:paragraph-rsid="0018e356"/>
    </style:style>
    <style:style style:name="P7" style:family="paragraph" style:parent-style-name="Standard">
      <style:text-properties officeooo:rsid="001722b3" officeooo:paragraph-rsid="001722b3"/>
    </style:style>
    <style:style style:name="P8" style:family="paragraph" style:parent-style-name="Standard">
      <style:text-properties officeooo:rsid="001b4107" officeooo:paragraph-rsid="001b4107"/>
    </style:style>
    <style:style style:name="T1" style:family="text">
      <style:text-properties fo:color="#c9d1d9" loext:opacity="100%"/>
    </style:style>
    <style:style style:name="T2" style:family="text">
      <style:text-properties fo:color="#d4d4d4" loext:opacity="100%"/>
    </style:style>
    <style:style style:name="T3" style:family="text">
      <style:text-properties fo:color="#4ec9b0" loext:opacity="100%"/>
    </style:style>
    <style:style style:name="T4" style:family="text">
      <style:text-properties fo:color="#d2a8ff" loext:opacity="100%"/>
    </style:style>
    <style:style style:name="T5" style:family="text">
      <style:text-properties fo:color="#ffa657" loext:opacity="100%"/>
    </style:style>
    <style:style style:name="T6" style:family="text">
      <style:text-properties fo:color="#b5cea8" loext:opacity="100%"/>
    </style:style>
    <style:style style:name="T7" style:family="text">
      <style:text-properties fo:color="#569cd6" loext:opacity="100%"/>
    </style:style>
    <style:style style:name="T8" style:family="text">
      <style:text-properties fo:color="#a5d6ff"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5/2026</text:p>
      <text:p text:style-name="P1"/>
      <text:p text:style-name="P1">Después de realizar el estudio de los metadatos para evitar tener diferencias en sexo, edad y años de edudación, se ha procedido a eliminar los siguientes pacientes para equilibrar los grupos:</text:p>
      <text:p text:style-name="P1"/>
      <text:p text:style-name="P4"><text:span text:style-name="T1">patients_to_remove_TFM</text:span> <text:span text:style-name="T2">=</text:span> [<text:span text:style-name="T8">"HUMV_NFC_11"</text:span>,<text:span text:style-name="T8">"HUMV_HC_25"</text:span>,<text:span text:style-name="T8">"HUMV_HC_9"</text:span>,<text:span text:style-name="T8">"HUMV_NFC_1"</text:span>,<text:span text:style-name="T8">"HUMV_NFC_17"</text:span>,<text:span text:style-name="T8">"HUMV_HC_15"</text:span>,<text:span text:style-name="T8">"HUMV_NFC_10"</text:span>,<text:span text:style-name="T8">"HUMV_NFC_23"</text:span>,<text:span text:style-name="T8">"HUMV_NFC_5"</text:span>,<text:span text:style-name="T8">"HUMV_NFC_24"</text:span>,<text:span text:style-name="T8">"HUMV_HC_4"</text:span>, <text:span text:style-name="T8">"HUMV_NFC_21"</text:span>, <text:span text:style-name="T8">"HUMV_NFC_16"</text:span>, <text:span text:style-name="T8">"HUMV_HC_18"</text:span>, <text:span text:style-name="T8">"HUMV_PD_1"</text:span>, <text:span text:style-name="T8">"HUMV_PD_2"</text:span>, <text:span text:style-name="T8">"HUMV_PD_9"</text:span>, <text:span text:style-name="T8">"HUMV_PD_13"</text:span>, <text:span text:style-name="T8">"HUMV_AC_2"</text:span>, <text:span text:style-name="T8">"HUMV_AC_5"</text:span>, <text:span text:style-name="T8">"HUMV_AC_32"</text:span>, <text:span text:style-name="T8">"HUMV_AC_24"</text:span>, <text:span text:style-name="T8">"HUMV_AC_14"</text:span>] </text:p>
      <text:p text:style-name="P3"/>
      <text:p text:style-name="P1"/>
      <text:p text:style-name="P6">Estos pacientes se escogieron arbitrariamente por efecto de la edad (menores de 50 y mayores de 85), con lo que se comprime el rango de edad y podría mejorar los resultados finales.</text:p>
      <text:p text:style-name="P2"/>
      <text:p text:style-name="P2">Con esto se obtienen un total de 37 HC + NFC, 29 AC y 30 PD. Se ha optado a quedarse con más pacientes AC de los que realmente tienen DaTSCAN para ampliar la muestra. Ya veremos cómo lo podemos hacer después para relacionarlo con los resultados del DaTSCAN (parece que esto no entrará en el TFM)</text:p>
      <text:p text:style-name="P1"/>
      <text:p text:style-name="P1">Se van a crear audios de 5 <text:s/>y 10 segundos para los modelos ML. Se han escogido los siguientes parámetros para el pre-procesamiento de los audios (después de pasarlos por DeepFilter):</text:p>
      <text:p text:style-name="P1"/>
      <text:p text:style-name="P4"><text:span text:style-name="T1">audio_segments</text:span>, <text:span text:style-name="T1">labels_np</text:span>, <text:span text:style-name="T1">patient_ids</text:span>, <text:span text:style-name="T1">exercises</text:span> <text:span text:style-name="T2">=</text:span> <text:span text:style-name="T3">audio_processor</text:span>.<text:span text:style-name="T4">execute_preprocess_and_split</text:span>(</text:p>
      <text:p text:style-name="P3"><text:span text:style-name="T1">df_filtered</text:span>,</text:p>
      <text:p text:style-name="P3"><text:span text:style-name="T5">start_time</text:span><text:span text:style-name="T2">=</text:span><text:span text:style-name="T1">start_time</text:span>,</text:p>
      <text:p text:style-name="P3"><text:span text:style-name="T5">chunk_duration</text:span><text:span text:style-name="T2">=</text:span><text:span text:style-name="T1">chunk_duration</text:span>,</text:p>
      <text:p text:style-name="P3"><text:span text:style-name="T5">max_duration</text:span><text:span text:style-name="T2">=</text:span><text:span text:style-name="T1">max_duration</text:span>,</text:p>
      <text:p text:style-name="P3"><text:span text:style-name="T5">target_sr</text:span><text:span text:style-name="T2">=</text:span><text:span text:style-name="T6">16000</text:span>,</text:p>
      <text:p text:style-name="P3"><text:span text:style-name="T5">remove_silence</text:span><text:span text:style-name="T2">=</text:span><text:span text:style-name="T7">True</text:span>,</text:p>
      <text:p text:style-name="P3"><text:span text:style-name="T5">top_db</text:span><text:span text:style-name="T2">=</text:span><text:span text:style-name="T6">20</text:span>,</text:p>
      <text:p text:style-name="P3"><text:span text:style-name="T5">silence_duration</text:span><text:span text:style-name="T2">=</text:span><text:span text:style-name="T6">2</text:span>,</text:p>
      <text:p text:style-name="P3"><text:span text:style-name="T5">file_path_column</text:span><text:span text:style-name="T2">=</text:span><text:span text:style-name="T8">'File_Path'</text:span>,</text:p>
      <text:p text:style-name="P3"><text:span text:style-name="T5">label_column</text:span><text:span text:style-name="T2">=</text:span><text:span text:style-name="T8">'Label'</text:span>,</text:p>
      <text:p text:style-name="P3"><text:span text:style-name="T5">patient_column</text:span><text:span text:style-name="T2">=</text:span><text:span text:style-name="T8">'Patient'</text:span>,</text:p>
      <text:p text:style-name="P3"><text:span text:style-name="T5">audio_name_column</text:span><text:span text:style-name="T2">=</text:span><text:span text:style-name="T8">'Audio_Name'</text:span>,</text:p>
      <text:p text:style-name="P3"><text:span text:style-name="T5">overlap</text:span><text:span text:style-name="T2">=</text:span><text:span text:style-name="T6">1</text:span>,</text:p>
      <text:p text:style-name="P3"><text:span text:style-name="T5">min_chunk_ratio</text:span><text:span text:style-name="T2">=</text:span><text:span text:style-name="T6">0.75</text:span>,</text:p>
      <text:p text:style-name="P3">)</text:p>
      <text:p text:style-name="P1"/>
      <text:p text:style-name="P8">8/5/20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11:07:26.138644057</meta:creation-date>
    <meta:generator>LibreOffice/7.3.7.2$Linux_X86_64 LibreOffice_project/30$Build-2</meta:generator>
    <dc:date>2026-05-08T10:16:19.538746465</dc:date>
    <meta:editing-duration>PT5M37S</meta:editing-duration>
    <meta:editing-cycles>3</meta:editing-cycles>
    <meta:document-statistic meta:table-count="0" meta:image-count="0" meta:object-count="0" meta:page-count="1" meta:paragraph-count="23" meta:word-count="189" meta:character-count="1594" meta:non-whitespace-character-count="1426"/>
  </office:meta>
</office:document-meta>
</file>