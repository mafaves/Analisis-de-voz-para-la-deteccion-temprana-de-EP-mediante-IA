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22b3" officeooo:paragraph-rsid="001722b3"/>
    </style:style>
    <style:style style:name="P2" style:family="paragraph" style:parent-style-name="Standard">
      <style:text-properties officeooo:rsid="001722b3" officeooo:paragraph-rsid="0018e356"/>
    </style:style>
    <style:style style:name="P3" style:family="paragraph" style:parent-style-name="Standard">
      <style:paragraph-properties style:line-height-at-least="0.503cm"/>
      <style:text-properties fo:color="#bbbebf" loext:opacity="100%" style:font-name="Droid Sans Mono" fo:font-size="10.5pt" fo:font-weight="normal" fo:background-color="#121314"/>
    </style:style>
    <style:style style:name="P4" style:family="paragraph" style:parent-style-name="Standard">
      <style:text-properties fo:color="#bbbebf" loext:opacity="100%" style:font-name="Droid Sans Mono" fo:font-size="10.5pt" fo:font-weight="normal" officeooo:rsid="001722b3" officeooo:paragraph-rsid="001722b3" fo:background-color="#121314"/>
    </style:style>
    <style:style style:name="P5" style:family="paragraph" style:parent-style-name="Standard">
      <style:text-properties fo:color="#bbbebf" loext:opacity="100%" style:font-name="Droid Sans Mono" fo:font-size="10.5pt" fo:font-weight="normal" officeooo:paragraph-rsid="002324ff" fo:background-color="#121314"/>
    </style:style>
    <style:style style:name="P6" style:family="paragraph" style:parent-style-name="Standard">
      <style:text-properties fo:font-size="18pt" fo:font-weight="bold" officeooo:rsid="001722b3" officeooo:paragraph-rsid="001722b3" style:font-size-asian="18pt" style:font-weight-asian="bold" style:font-size-complex="18pt" style:font-weight-complex="bold"/>
    </style:style>
    <style:style style:name="P7" style:family="paragraph" style:parent-style-name="Standard">
      <style:text-properties fo:font-size="18pt" fo:font-weight="bold" officeooo:rsid="001b4107" officeooo:paragraph-rsid="001b4107" style:font-size-asian="18pt" style:font-weight-asian="bold" style:font-size-complex="18pt" style:font-weight-complex="bold"/>
    </style:style>
    <style:style style:name="P8" style:family="paragraph" style:parent-style-name="Standard">
      <style:text-properties officeooo:rsid="0018e356" officeooo:paragraph-rsid="0018e356"/>
    </style:style>
    <style:style style:name="P9" style:family="paragraph" style:parent-style-name="Standard">
      <style:text-properties fo:font-size="12pt" fo:font-weight="normal" officeooo:rsid="001d007f" officeooo:paragraph-rsid="001d007f" style:font-size-asian="10.5pt" style:font-weight-asian="normal" style:font-size-complex="12pt" style:font-weight-complex="normal"/>
    </style:style>
    <style:style style:name="P10" style:family="paragraph" style:parent-style-name="Standard">
      <style:text-properties fo:font-size="12pt" fo:font-weight="normal" officeooo:rsid="001fd900" officeooo:paragraph-rsid="001fd900" style:font-size-asian="10.5pt" style:font-weight-asian="normal" style:font-size-complex="12pt" style:font-weight-complex="normal"/>
    </style:style>
    <style:style style:name="P11" style:family="paragraph" style:parent-style-name="Standard">
      <style:text-properties fo:font-size="12pt" fo:font-weight="normal" officeooo:rsid="002324ff" officeooo:paragraph-rsid="002324ff" style:font-size-asian="10.5pt" style:font-weight-asian="normal" style:font-size-complex="12pt" style:font-weight-complex="normal"/>
    </style:style>
    <style:style style:name="P12" style:family="paragraph" style:parent-style-name="Standard">
      <style:paragraph-properties style:line-height-at-least="0.503cm"/>
      <style:text-properties fo:color="#8b949e" loext:opacity="100%" style:font-name="Droid Sans Mono" fo:font-size="10.5pt" fo:font-weight="normal" fo:background-color="#121314"/>
    </style:style>
    <style:style style:name="P13" style:family="paragraph" style:parent-style-name="Standard">
      <style:text-properties fo:color="#8b949e" loext:opacity="100%" style:font-name="Droid Sans Mono" fo:font-size="10.5pt" fo:font-weight="normal" officeooo:rsid="001722b3" officeooo:paragraph-rsid="001722b3" fo:background-color="#121314"/>
    </style:style>
    <style:style style:name="P14" style:family="paragraph" style:parent-style-name="Standard">
      <style:paragraph-properties style:line-height-at-least="0.503cm"/>
    </style:style>
    <style:style style:name="P15" style:family="paragraph" style:parent-style-name="Standard">
      <style:paragraph-properties style:line-height-at-least="0.503cm"/>
      <style:text-properties fo:color="#bbbebf" loext:opacity="100%" style:font-name="Droid Sans Mono" fo:font-size="10.5pt" fo:font-weight="normal" fo:background-color="#121314"/>
    </style:style>
    <style:style style:name="P16" style:family="paragraph" style:parent-style-name="Standard">
      <style:paragraph-properties style:line-height-at-least="0.503cm"/>
      <style:text-properties fo:color="#bbbebf" loext:opacity="100%" style:font-name="Droid Sans Mono" fo:font-size="10.5pt" fo:font-weight="normal" officeooo:rsid="0026acd9" officeooo:paragraph-rsid="0026acd9" fo:background-color="#121314"/>
    </style:style>
    <style:style style:name="P17" style:family="paragraph" style:parent-style-name="Standard">
      <style:text-properties fo:font-size="12pt" fo:font-weight="normal" officeooo:rsid="002324ff" officeooo:paragraph-rsid="0026acd9" style:font-size-asian="10.5pt" style:font-weight-asian="normal" style:font-size-complex="12pt" style:font-weight-complex="normal"/>
    </style:style>
    <style:style style:name="P18" style:family="paragraph" style:parent-style-name="Standard">
      <style:text-properties fo:font-size="12pt" fo:font-weight="normal" officeooo:rsid="0026acd9" officeooo:paragraph-rsid="0026acd9" style:font-size-asian="10.5pt" style:font-weight-asian="normal" style:font-size-complex="12pt" style:font-weight-complex="normal"/>
    </style:style>
    <style:style style:name="T1" style:family="text">
      <style:text-properties fo:color="#c9d1d9" loext:opacity="100%"/>
    </style:style>
    <style:style style:name="T2" style:family="text">
      <style:text-properties fo:color="#c9d1d9" loext:opacity="100%" officeooo:rsid="002324ff" style:font-size-asian="10.5pt" style:font-weight-asian="normal" style:font-size-complex="12pt" style:font-weight-complex="normal"/>
    </style:style>
    <style:style style:name="T3" style:family="text">
      <style:text-properties fo:color="#d4d4d4" loext:opacity="100%"/>
    </style:style>
    <style:style style:name="T4" style:family="text">
      <style:text-properties fo:color="#d4d4d4" loext:opacity="100%" officeooo:rsid="002324ff" style:font-size-asian="10.5pt" style:font-weight-asian="normal" style:font-size-complex="12pt" style:font-weight-complex="normal"/>
    </style:style>
    <style:style style:name="T5" style:family="text">
      <style:text-properties fo:color="#4ec9b0" loext:opacity="100%"/>
    </style:style>
    <style:style style:name="T6" style:family="text">
      <style:text-properties fo:color="#d2a8ff" loext:opacity="100%"/>
    </style:style>
    <style:style style:name="T7" style:family="text">
      <style:text-properties fo:color="#ffa657" loext:opacity="100%"/>
    </style:style>
    <style:style style:name="T8" style:family="text">
      <style:text-properties fo:color="#b5cea8" loext:opacity="100%"/>
    </style:style>
    <style:style style:name="T9" style:family="text">
      <style:text-properties fo:color="#569cd6" loext:opacity="100%"/>
    </style:style>
    <style:style style:name="T10" style:family="text">
      <style:text-properties fo:color="#a5d6ff" loext:opacity="100%"/>
    </style:style>
    <style:style style:name="T11" style:family="text">
      <style:text-properties fo:color="#a5d6ff" loext:opacity="100%" officeooo:rsid="002324ff" style:font-size-asian="10.5pt" style:font-weight-asian="normal" style:font-size-complex="12pt" style:font-weight-complex="normal"/>
    </style:style>
    <style:style style:name="T12" style:family="text">
      <style:text-properties officeooo:rsid="002324ff" style:font-size-asian="10.5pt" style:font-weight-asian="normal" style:font-size-complex="12pt" style:font-weight-complex="normal"/>
    </style:style>
    <style:style style:name="T13" style:family="text">
      <style:text-properties officeooo:rsid="0026ac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5/2026</text:p>
      <text:p text:style-name="P1"/>
      <text:p text:style-name="P1">Después de realizar el estudio de los metadatos para evitar tener diferencias en sexo, edad y años de edudación, se ha procedido a eliminar los siguientes pacientes para equilibrar los grupos:</text:p>
      <text:p text:style-name="P1"/>
      <text:p text:style-name="P4"><text:span text:style-name="T1">patients_to_remove_TFM</text:span> <text:span text:style-name="T3">=</text:span> [<text:span text:style-name="T10">"HUMV_NFC_11"</text:span>,<text:span text:style-name="T10">"HUMV_HC_25"</text:span>,<text:span text:style-name="T10">"HUMV_HC_9"</text:span>,<text:span text:style-name="T10">"HUMV_NFC_1"</text:span>,<text:span text:style-name="T10">"HUMV_NFC_17"</text:span>,<text:span text:style-name="T10">"HUMV_HC_15"</text:span>,<text:span text:style-name="T10">"HUMV_NFC_10"</text:span>,<text:span text:style-name="T10">"HUMV_NFC_23"</text:span>,<text:span text:style-name="T10">"HUMV_NFC_5"</text:span>,<text:span text:style-name="T10">"HUMV_NFC_24"</text:span>,<text:span text:style-name="T10">"HUMV_HC_4"</text:span>, <text:span text:style-name="T10">"HUMV_NFC_21"</text:span>, <text:span text:style-name="T10">"HUMV_NFC_16"</text:span>, <text:span text:style-name="T10">"HUMV_HC_18"</text:span>, <text:span text:style-name="T10">"HUMV_PD_1"</text:span>, <text:span text:style-name="T10">"HUMV_PD_2"</text:span>, <text:span text:style-name="T10">"HUMV_PD_9"</text:span>, <text:span text:style-name="T10">"HUMV_PD_13"</text:span>, <text:span text:style-name="T10">"HUMV_AC_2"</text:span>, <text:span text:style-name="T10">"HUMV_AC_5"</text:span>, <text:span text:style-name="T10">"HUMV_AC_32"</text:span>, <text:span text:style-name="T10">"HUMV_AC_24"</text:span>, <text:span text:style-name="T10">"HUMV_AC_14"</text:span>] </text:p>
      <text:p text:style-name="P3"/>
      <text:p text:style-name="P1"/>
      <text:p text:style-name="P8">Estos pacientes se escogieron arbitrariamente por efecto de la edad (menores de 50 y mayores de 85), con lo que se comprime el rango de edad y podría mejorar los resultados finales.</text:p>
      <text:p text:style-name="P2"/>
      <text:p text:style-name="P2">Con esto se obtienen un total de 37 HC + NFC, 29 AC y 30 PD. Se ha optado a quedarse con más pacientes AC de los que realmente tienen DaTSCAN para ampliar la muestra. Ya veremos cómo lo podemos hacer después para relacionarlo con los resultados del DaTSCAN (parece que esto no entrará en el TFM)</text:p>
      <text:p text:style-name="P1"/>
      <text:p text:style-name="P1">Se van a crear audios de 5 <text:s/>y 10 segundos para los modelos ML. Se han escogido los siguientes parámetros para el pre-procesamiento de los audios (después de pasarlos por DeepFilter):</text:p>
      <text:p text:style-name="P13"># Define the exercise sets and their corresponding split parameters</text:p>
      <text:p text:style-name="P3"><text:span text:style-name="T1">exercise_sets</text:span> <text:span text:style-name="T3">=</text:span> [</text:p>
      <text:p text:style-name="P12"># (description, exact_names_values, start_time, chunk_duration, max_duration)</text:p>
      <text:p text:style-name="P3">(<text:span text:style-name="T10">"2 audios of 5 seconds"</text:span>, [<text:span text:style-name="T10">'aueoi.wav'</text:span>, <text:span text:style-name="T10">'ka.wav'</text:span>, <text:span text:style-name="T10">'pa.wav'</text:span>, <text:span text:style-name="T10">'patachaka.wav'</text:span>, <text:span text:style-name="T10">'pataka.wav'</text:span>, <text:span text:style-name="T10">'ta.wav'</text:span>, <text:span text:style-name="T10">'uy.wav'</text:span>, <text:span text:style-name="T10">'vocal.wav'</text:span>], <text:span text:style-name="T8">0</text:span>, <text:span text:style-name="T8">5</text:span>, <text:span text:style-name="T8">10</text:span>),</text:p>
      <text:p text:style-name="P3">(<text:span text:style-name="T10">"6 audios of 5 seconds"</text:span>, [<text:span text:style-name="T10">'habla libre.wav'</text:span>, <text:span text:style-name="T10">'robo galletas.wav'</text:span>], <text:span text:style-name="T8">0</text:span>, <text:span text:style-name="T8">5</text:span>, <text:span text:style-name="T8">35</text:span>),</text:p>
      <text:p text:style-name="P3">(<text:span text:style-name="T10">"10 audios of 5 seconds"</text:span>, [<text:span text:style-name="T10">'fluencia categorial.wav'</text:span>], <text:span text:style-name="T8">0</text:span>, <text:span text:style-name="T8">5</text:span>, <text:span text:style-name="T8">60</text:span>),</text:p>
      <text:p text:style-name="P3">(<text:span text:style-name="T10">"25 audios of 5 seconds"</text:span>, [<text:span text:style-name="T10">'lectura texto.wav'</text:span>], <text:span text:style-name="T8">0</text:span>, <text:span text:style-name="T8">5</text:span>, <text:span text:style-name="T8">150</text:span>),</text:p>
      <text:p text:style-name="P3">]</text:p>
      <text:p text:style-name="P1"/>
      <text:p text:style-name="P1"/>
      <text:p text:style-name="P4"><text:span text:style-name="T1">audio_segments</text:span>, <text:span text:style-name="T1">labels_np</text:span>, <text:span text:style-name="T1">patient_ids</text:span>, <text:span text:style-name="T1">exercises</text:span> <text:span text:style-name="T3">=</text:span> <text:span text:style-name="T5">audio_processor</text:span>.<text:span text:style-name="T6">execute_preprocess_and_split</text:span>(</text:p>
      <text:p text:style-name="P3"><text:span text:style-name="T1">df_filtered</text:span>,</text:p>
      <text:p text:style-name="P3"><text:span text:style-name="T7">start_time</text:span><text:span text:style-name="T3">=</text:span><text:span text:style-name="T1">start_time</text:span>,</text:p>
      <text:p text:style-name="P3"><text:span text:style-name="T7">chunk_duration</text:span><text:span text:style-name="T3">=</text:span><text:span text:style-name="T1">chunk_duration</text:span>,</text:p>
      <text:p text:style-name="P3"><text:span text:style-name="T7">max_duration</text:span><text:span text:style-name="T3">=</text:span><text:span text:style-name="T1">max_duration</text:span>,</text:p>
      <text:p text:style-name="P3"><text:span text:style-name="T7">target_sr</text:span><text:span text:style-name="T3">=</text:span><text:span text:style-name="T8">16000</text:span>,</text:p>
      <text:p text:style-name="P3"><text:span text:style-name="T7">remove_silence</text:span><text:span text:style-name="T3">=</text:span><text:span text:style-name="T9">True</text:span>,</text:p>
      <text:p text:style-name="P3"><text:span text:style-name="T7">top_db</text:span><text:span text:style-name="T3">=</text:span><text:span text:style-name="T8">20</text:span>,</text:p>
      <text:p text:style-name="P3"><text:span text:style-name="T7">silence_duration</text:span><text:span text:style-name="T3">=</text:span><text:span text:style-name="T8">2</text:span>,</text:p>
      <text:p text:style-name="P3"><text:span text:style-name="T7">file_path_column</text:span><text:span text:style-name="T3">=</text:span><text:span text:style-name="T10">'File_Path'</text:span>,</text:p>
      <text:p text:style-name="P3"><text:span text:style-name="T7">label_column</text:span><text:span text:style-name="T3">=</text:span><text:span text:style-name="T10">'Label'</text:span>,</text:p>
      <text:p text:style-name="P3"><text:span text:style-name="T7">patient_column</text:span><text:span text:style-name="T3">=</text:span><text:span text:style-name="T10">'Patient'</text:span>,</text:p>
      <text:p text:style-name="P3"><text:span text:style-name="T7">audio_name_column</text:span><text:span text:style-name="T3">=</text:span><text:span text:style-name="T10">'Audio_Name'</text:span>,</text:p>
      <text:p text:style-name="P3"><text:soft-page-break/><text:span text:style-name="T7">overlap</text:span><text:span text:style-name="T3">=</text:span><text:span text:style-name="T8">1</text:span>,</text:p>
      <text:p text:style-name="P3"><text:span text:style-name="T7">min_chunk_ratio</text:span><text:span text:style-name="T3">=</text:span><text:span text:style-name="T8">0.75</text:span>,</text:p>
      <text:p text:style-name="P3">)</text:p>
      <text:p text:style-name="P1"/>
      <text:p text:style-name="P7">8/5/2026</text:p>
      <text:p text:style-name="P9">Se ha acabado con el análisis de los metadatos, viendo diferencias por pares en la variable Sexo y también por la variable UPDRS</text:p>
      <text:p text:style-name="P9"/>
      <text:p text:style-name="P10">Se han obtenido ya las características para Librosa, Praat y Opensmile de los audios de 5 segundos y se ha llevado a cabo el entrenamiento con SVM</text:p>
      <text:p text:style-name="P10"/>
      <text:p text:style-name="P11">11/6/2026</text:p>
      <text:p text:style-name="P11">Con los mismos parámetros que la anterior vez, se hicieron audios de 10 segundos para explorar si mejoran o no las clasificaciones:</text:p>
      <text:p text:style-name="P5"><text:span text:style-name="T2">output_folder</text:span><text:span text:style-name="T12"> </text:span><text:span text:style-name="T4">=</text:span><text:span text:style-name="T12"> </text:span><text:span text:style-name="T11">'/home/marcos/Documentos/GitHub/TFM_code/data/processed/10s_with_1s_overlap_16kHz_top_db_20'</text:span></text:p>
      <text:p text:style-name="P14"/>
      <text:p text:style-name="P12"># Define the exercise sets and their corresponding split parameters</text:p>
      <text:p text:style-name="P3"><text:span text:style-name="T1">exercise_sets</text:span> <text:span text:style-name="T3">=</text:span> [</text:p>
      <text:p text:style-name="P12"># (description, exact_names_values, start_time, chunk_duration, max_duration)</text:p>
      <text:p text:style-name="P3">(<text:span text:style-name="T10">"1 audios of 10 seconds"</text:span>, [<text:span text:style-name="T10">'aueoi.wav'</text:span>, <text:span text:style-name="T10">'ka.wav'</text:span>, <text:span text:style-name="T10">'pa.wav'</text:span>, <text:span text:style-name="T10">'patachaka.wav'</text:span>, <text:span text:style-name="T10">'pataka.wav'</text:span>, <text:span text:style-name="T10">'ta.wav'</text:span>, <text:span text:style-name="T10">'uy.wav'</text:span>, <text:span text:style-name="T10">'vocal.wav'</text:span>], <text:span text:style-name="T8">0</text:span>, <text:span text:style-name="T8">10</text:span>, <text:span text:style-name="T8">10</text:span>),</text:p>
      <text:p text:style-name="P3">(<text:span text:style-name="T10">"3 audios of 10 seconds"</text:span>, [<text:span text:style-name="T10">'habla libre.wav'</text:span>, <text:span text:style-name="T10">'robo galletas.wav'</text:span>], <text:span text:style-name="T8">0</text:span>, <text:span text:style-name="T8">10</text:span>, <text:span text:style-name="T8">35</text:span>),</text:p>
      <text:p text:style-name="P3">(<text:span text:style-name="T10">"6 audios of 10 seconds"</text:span>, [<text:span text:style-name="T10">'fluencia categorial.wav'</text:span>], <text:span text:style-name="T8">0</text:span>, <text:span text:style-name="T8">10</text:span>, <text:span text:style-name="T8">60</text:span>),</text:p>
      <text:p text:style-name="P3">(<text:span text:style-name="T10">"10 audios of 10 seconds"</text:span>, [<text:span text:style-name="T10">'lectura texto.wav'</text:span>], <text:span text:style-name="T8">0</text:span>, <text:span text:style-name="T8">10</text:span>, <text:span text:style-name="T8">150</text:span>),</text:p>
      <text:p text:style-name="P3">]</text:p>
      <text:p text:style-name="P3"/>
      <text:p text:style-name="P16"/>
      <text:p text:style-name="P17">1<text:span text:style-name="T13">5</text:span>/6/2026</text:p>
      <text:p text:style-name="P18">SVM se entrenó con scaling = True</text:p>
      <text:p text:style-name="P18">RF con scaling = False (por ahor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6T11:07:26.138644057</meta:creation-date>
    <meta:generator>LibreOffice/7.3.7.2$Linux_X86_64 LibreOffice_project/30$Build-2</meta:generator>
    <dc:date>2026-05-15T10:28:11.461011981</dc:date>
    <meta:editing-duration>PT25M25S</meta:editing-duration>
    <meta:editing-cycles>8</meta:editing-cycles>
    <meta:document-statistic meta:table-count="0" meta:image-count="0" meta:object-count="0" meta:page-count="2" meta:paragraph-count="47" meta:word-count="416" meta:character-count="3203" meta:non-whitespace-character-count="2832"/>
  </office:meta>
</office:document-meta>
</file>